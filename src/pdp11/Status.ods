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0.5102in"/>
    </style:style>
    <style:style style:name="co12" style:family="table-column">
      <style:table-column-properties fo:break-before="auto" style:column-width="7.498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3.1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36" style:family="table-cell" style:parent-style-name="Default">
      <style:table-cell-properties fo:background-color="#e6e6e6" fo:wrap-option="wrap" fo:border="0.74pt solid #000000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47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48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ext-properties style:font-name="Liberation Sans" fo:font-size="10pt" style:font-size-asian="10pt" style:font-size-complex="10pt"/>
    </style:style>
    <style:style style:name="ce82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7" office:value-type="string" calcext:value-type="string">
            <text:p>Processor =&gt;</text:p>
          </table:table-cell>
          <table:table-cell table:style-name="ce38" office:value-type="string" calcext:value-type="string">
            <text:p>23/24</text:p>
          </table:table-cell>
          <table:table-cell table:style-name="ce38" office:value-type="string" calcext:value-type="string">
            <text:p>44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34</text:p>
          </table:table-cell>
          <table:table-cell table:style-name="ce38" office:value-type="string" calcext:value-type="string">
            <text:p>LSI-11</text:p>
          </table:table-cell>
          <table:table-cell table:style-name="ce47" office:value-type="string" calcext:value-type="string">
            <text:p>05/10</text:p>
          </table:table-cell>
          <table:table-cell table:style-name="ce38" office:value-type="string" calcext:value-type="string">
            <text:p>15/20</text:p>
          </table:table-cell>
          <table:table-cell table:style-name="ce38" office:value-type="string" calcext:value-type="string">
            <text:p>35/40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70</text:p>
          </table:table-cell>
          <table:table-cell table:style-name="ce38" office:value-type="string" calcext:value-type="string">
            <text:p>60</text:p>
          </table:table-cell>
          <table:table-cell table:style-name="ce38" office:value-type="string" calcext:value-type="string">
            <text:p>J-11</text:p>
          </table:table-cell>
          <table:table-cell table:style-name="ce38" office:value-type="string" calcext:value-type="string">
            <text:p>T-11</text:p>
          </table:table-cell>
          <table:table-cell table:style-name="ce49" office:value-type="string" calcext:value-type="string">
            <text:p>VAX</text:p>
          </table:table-cell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9" table:number-columns-repeated="5"/>
          <table:table-cell table:style-name="ce48"/>
          <table:table-cell table:style-name="ce39" table:number-columns-repeated="7"/>
          <table:table-cell table:style-name="ce50"/>
        </table:table-row>
        <table:table-row table:style-name="ro2">
          <table:table-cell table:style-name="ce2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2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OPR PC,X(R); OPR PC,@X(R); OPR PC,@A: location A will contain PC of OPR+4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4">
          <table:table-cell table:style-name="ce28" office:value-type="string" calcext:value-type="string">
            <text:p>OPR PC,X(R); OPR PC,@X(R); OPR PC,@A: location A will contain PC of OPR+2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3">
          <table:table-cell table:style-name="ce27" office:value-type="string" calcext:value-type="string">
            <text:p>JMP (R)+; JSR reg,(R)+: contents of R are incremented by 2 then used as new PC address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8" office:value-type="string" calcext:value-type="string">
            <text:p>JMP (R)+; JSR reg,(R)+: initial contents of R are used as new PC address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table:number-columns-repeated="2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JMP %R; JSR reg,%R traps to 10 (illegal instruction)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JMP %R; JSR reg,%R traps to 04 (bus error)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SWAB does not change V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1">
          <table:table-cell table:style-name="ce28" office:value-type="string" calcext:value-type="string">
            <text:p>SWAB clears V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Register addresses (177700-177717) are valid program addresses for CPU</text:p>
          </table:table-cell>
          <table:table-cell table:style-name="ce40" table:number-columns-repeated="2"/>
          <table:table-cell table:style-name="ce43" office:value-type="string" calcext:value-type="string">
            <text:p>X?</text:p>
          </table:table-cell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3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4">
          <table:table-cell table:style-name="ce35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53"/>
        </table:table-row>
        <table:table-row table:style-name="ro4">
          <table:table-cell table:style-name="ce28" office:value-type="string" calcext:value-type="string">
            <text:p>Register addresses (177700-177717) timeout for CPU, but can be used by console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1">
          <table:table-cell table:style-name="ce27" office:value-type="string" calcext:value-type="string">
            <text:p>Basic PDP-11 instructions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6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4">
          <table:table-cell table:style-name="ce35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53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Floating Point in base machine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4">
          <table:table-cell table:style-name="ce35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45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 table:number-columns-repeated="6"/>
          <table:table-cell table:style-name="ce53"/>
        </table:table-row>
        <table:table-row table:style-name="ro4">
          <table:table-cell table:style-name="ce35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4">
          <table:table-cell table:style-name="ce35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1">
          <table:table-cell table:style-name="ce35" office:value-type="string" calcext:value-type="string">
            <text:p>KEV-11 adds EIS/FIS instructions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X</text:p>
          </table:table-cell>
          <table:table-cell table:style-name="ce45" table:number-columns-repeated="2"/>
          <table:table-cell table:number-columns-repeated="6"/>
          <table:table-cell table:style-name="ce53"/>
        </table:table-row>
        <table:table-row table:style-name="ro1">
          <table:table-cell table:style-name="ce35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office:value-type="string" calcext:value-type="string">
            <text:p>X</text:p>
          </table:table-cell>
          <table:table-cell/>
          <table:table-cell table:style-name="ce45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28" office:value-type="string" calcext:value-type="string">
            <text:p>CSM instruction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4">
          <table:table-cell table:style-name="ce36" office:value-type="string" calcext:value-type="string">
            <text:p>Power fail and reset – mostly hardware/bus specific</text:p>
          </table:table-cell>
          <table:table-cell table:style-name="ce42" table:number-columns-repeated="2"/>
          <table:table-cell table:style-name="ce46"/>
          <table:table-cell table:style-name="ce42" table:number-columns-repeated="2"/>
          <table:table-cell table:style-name="ce46" table:number-columns-repeated="2"/>
          <table:table-cell table:style-name="ce42" table:number-columns-repeated="6"/>
          <table:table-cell table:style-name="ce54"/>
        </table:table-row>
        <table:table-row table:style-name="ro1">
          <table:table-cell table:style-name="ce27" office:value-type="string" calcext:value-type="string">
            <text:p>No RTT instruction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7" office:value-type="string" calcext:value-type="string">
            <text:p>If RTT sets T bit, trap occurs after instruction following RT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table:number-columns-repeated="2"/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4">
          <table:table-cell table:style-name="ce28" office:value-type="string" calcext:value-type="string">
            <text:p>If RTI sets T bit, trap occurs after instruction following RTI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1" table:number-columns-repeated="6"/>
          <table:table-cell table:style-name="ce52"/>
        </table:table-row>
        <table:table-row table:style-name="ro4">
          <table:table-cell table:style-name="ce27" office:value-type="string" calcext:value-type="string">
            <text:p>Interrupts occurring while T bit set are handled after T bit tra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4" table:style-name="ce40" office:value-type="string" calcext:value-type="string">
            <text:p>X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4">
          <table:table-cell table:style-name="ce28" office:value-type="string" calcext:value-type="string">
            <text:p>Interrupts occurring while T bit set are handled before T bit trap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T bit trap will sequence out of WAI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T bit trap will not sequence out of WAIT</text:p>
          </table:table-cell>
          <table:table-cell table:style-name="ce41" table:number-columns-repeated="2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9" table:default-cell-style-name="ce29"/>
        <table:table-column table:style-name="co4" table:default-cell-style-name="ce29"/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MSGTY</text:p>
          </table:table-cell>
          <table:table-cell office:value-type="string" calcext:value-type="string">
            <text:p>#o000300</text:p>
          </table:table-cell>
          <table:table-cell office:value-type="string" calcext:value-type="string">
            <text:p>#xC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TAL</text:p>
          </table:table-cell>
          <table:table-cell table:number-columns-repeated="2"/>
          <table:table-cell office:value-type="string" calcext:value-type="string">
            <text:p>0x0172</text:p>
          </table:table-cell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TESTN</text:p>
          </table:table-cell>
          <table:table-cell table:number-columns-repeated="2"/>
          <table:table-cell office:value-type="string" calcext:value-type="string">
            <text:p>#00a4</text:p>
          </table:table-cell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DEVCT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MSGAD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MSGLG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office:value-type="string" calcext:value-type="string">
            <text:p>F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office:value-type="string" calcext:value-type="string">
            <text:p>F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office:value-type="string" calcext:value-type="string">
            <text:p>F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ils in test 101 – inhibiting trace traps on trap instru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 <text:s/>Requires maintenance mode to be implemen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office:value-type="string" calcext:value-type="string">
            <text:p>Fail</text:p>
          </table:table-cell>
          <table:table-cell table:number-columns-repeated="6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9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bes" table:style-name="ta1">
        <table:table-column table:style-name="co13" table:default-cell-style-name="ce80"/>
        <table:table-column table:style-name="co8" table:default-cell-style-name="ce80"/>
        <table:table-column table:style-name="co8" table:number-columns-repeated="2" table:default-cell-style-name="Default"/>
        <table:table-column table:style-name="co14" table:default-cell-style-name="ce81"/>
        <table:table-row table:style-name="ro1">
          <table:table-cell table:style-name="ce79" office:value-type="string" calcext:value-type="string">
            <text:p>Address</text:p>
          </table:table-cell>
          <table:table-cell table:style-name="ce79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79" office:value-type="string" calcext:value-type="string">
            <text:p>8#772_0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79" office:value-type="string" calcext:value-type="string">
            <text:p>8#772_0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79" office:value-type="string" calcext:value-type="string">
            <text:p>8#772_1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5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79" office:value-type="string" calcext:value-type="string">
            <text:p>8#772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79" office:value-type="string" calcext:value-type="string">
            <text:p>8#772_5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79" office:value-type="string" calcext:value-type="string">
            <text:p>8#773_3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79" office:value-type="string" calcext:value-type="string">
            <text:p>8#774_4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79" office:value-type="string" calcext:value-type="string">
            <text:p>8#774_5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79" office:value-type="string" calcext:value-type="string">
            <text:p>8#776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82" office:value-type="string" calcext:value-type="string">
            <text:p>KL11/DL11 (#1-#16) - TU58 (#1-#16)</text:p>
          </table:table-cell>
        </table:table-row>
        <table:table-row table:style-name="ro1">
          <table:table-cell table:style-name="ce79" office:value-type="string" calcext:value-type="string">
            <text:p>8#776_7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79" office:value-type="string" calcext:value-type="string">
            <text:p>8#777_1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79" office:value-type="string" calcext:value-type="string">
            <text:p>8#777_17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79" office:value-type="string" calcext:value-type="string">
            <text:p>8#777_31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79" office:value-type="string" calcext:value-type="string">
            <text:p>8#777_33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79" office:value-type="string" calcext:value-type="string">
            <text:p>8#777_3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79" office:value-type="string" calcext:value-type="string">
            <text:p>8#777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79" office:value-type="string" calcext:value-type="string">
            <text:p>8#777_4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79" office:value-type="string" calcext:value-type="string">
            <text:p>8#777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79" office:value-type="string" calcext:value-type="string">
            <text:p>8#777_5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79" office:value-type="string" calcext:value-type="string">
            <text:p>8#777_57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79" office:value-type="string" calcext:value-type="string">
            <text:p>8#777_746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79" office:value-type="string" calcext:value-type="string">
            <text:p>8#777_7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 style:data-style-name="N2" text:time-value="11:56:28.165692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7-14T11:38:23.188955171</dc:date>
    <dc:creator>Brent Seidel</dc:creator>
    <meta:editing-duration>P10DT4H52M6S</meta:editing-duration>
    <meta:editing-cycles>31</meta:editing-cycles>
    <meta:generator>LibreOffice/24.2.5.2$MacOSX_AARCH64 LibreOffice_project/bffef4ea93e59bebbeaf7f431bb02b1a39ee8a59</meta:generator>
    <meta:document-statistic meta:table-count="3" meta:cell-count="662" meta:object-count="0"/>
  </office:meta>
</office:document-meta>
</file>